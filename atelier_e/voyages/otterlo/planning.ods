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6.572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43" number:language="en" number:country="GB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10043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43">
      <style:table-cell-properties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43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43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" table:default-cell-style-name="ce8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Hébergement</text:p>
          </table:table-cell>
          <table:table-cell table:style-name="ce9" table:number-columns-repeated="9"/>
        </table:table-row>
        <table:table-row table:style-name="ro2">
          <table:table-cell table:style-name="ce2" office:value-type="date" office:date-value="2026-05-19" calcext:value-type="date">
            <text:p>Tue 19 May 2026</text:p>
          </table:table-cell>
          <table:table-cell table:style-name="ce6" office:value-type="string" calcext:value-type="string">
            <text:p>- 14h25 aéroport de Nantes</text:p>
            <text:p>- 16h00 Schiphol airport</text:p>
            <text:p>- 17h26 Schiphol Railway station</text:p>
            <text:p>Intercity 3263 to Arnhem central</text:p>
            <text:p>18h28- Ede Wag. Station</text:p>
            <text:p>- 18h37 Bus N° 108</text:p>
            <text:p>- 18h54 Otterlo Rotonde</text:p>
          </table:table-cell>
          <table:table-cell table:style-name="ce6" office:value-type="string" calcext:value-type="string">
            <text:p>N° dossier Régis : ZUUXFT</text:p>
            <text:p>N° dossier Gwenola : </text:p>
            <text:p/>
            <text:p><text:span text:style-name="T1">Train précédent (3261) : 16h56</text:span></text:p>
          </table:table-cell>
          <table:table-cell table:style-name="ce6" office:value-type="string" calcext:value-type="string">
            <text:p>Tiny house – Irma</text:p>
            <text:p>Tél : 0031639480780</text:p>
          </table:table-cell>
          <table:table-cell table:style-name="ce10" table:number-columns-repeated="9"/>
        </table:table-row>
        <table:table-row table:style-name="ro1">
          <table:table-cell table:style-name="ce3" table:formula="of:=[.A2]+1" office:value-type="date" office:date-value="2026-05-20" calcext:value-type="date">
            <text:p>Wed 20 May 2026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table-cell table:style-name="ce3" table:formula="of:=[.A3]+1" office:value-type="date" office:date-value="2026-05-21" calcext:value-type="date">
            <text:p>Thu 21 May 2026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table-cell table:style-name="ce3" table:formula="of:=[.A4]+1" office:value-type="date" office:date-value="2026-05-22" calcext:value-type="date">
            <text:p>Fri 22 May 2026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table-cell table:style-name="ce3" table:formula="of:=[.A5]+1" office:value-type="date" office:date-value="2026-05-23" calcext:value-type="date">
            <text:p>Sat 23 May 2026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table-cell table:style-name="ce3" table:formula="of:=[.A6]+1" office:value-type="date" office:date-value="2026-05-24" calcext:value-type="date">
            <text:p>Sun 24 May 2026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table-cell table:style-name="ce3" table:formula="of:=[.A7]+1" office:value-type="date" office:date-value="2026-05-25" calcext:value-type="date">
            <text:p>Mon 25 May 2026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table-cell table:style-name="ce3" table:formula="of:=[.A8]+1" office:value-type="date" office:date-value="2026-05-26" calcext:value-type="date">
            <text:p>Tue 26 May 2026</text:p>
          </table:table-cell>
          <table:table-cell table:style-name="ce7" table:number-columns-repeated="3"/>
          <table:table-cell table:number-columns-repeated="9"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7:21:44.820072524</meta:creation-date>
    <dc:date>2026-04-14T18:17:13.971212548</dc:date>
    <meta:editing-duration>PT20M50S</meta:editing-duration>
    <meta:editing-cycles>2</meta:editing-cycles>
    <meta:generator>LibreOffice/24.2.7.2$Linux_X86_64 LibreOffice_project/420$Build-2</meta:generator>
    <meta:document-statistic meta:table-count="1" meta:cell-count="15" meta:object-count="0"/>
  </office:meta>
</office:document-meta>
</file>